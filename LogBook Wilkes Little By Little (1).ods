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5.69pt"/>
    </style:style>
    <style:style style:name="co2" style:family="table-column">
      <style:table-column-properties fo:break-before="auto" style:column-width="268.0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3pt" fo:font-style="normal" fo:text-shadow="none" style:text-underline-style="none" fo:font-weight="norm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 Rate</text:p>
          </table:table-cell>
          <table:table-cell table:style-name="ce1" office:value-type="string" calcext:value-type="string">
            <text:p>How did the day go</text:p>
          </table:table-cell>
          <table:table-cell table:style-name="ce1" office:value-type="string" calcext:value-type="string">
            <text:p>Sleep Hours</text:p>
          </table:table-cell>
          <table:table-cell table:style-name="ce1" office:value-type="string" calcext:value-type="string">
            <text:p>Column 5</text:p>
          </table:table-cell>
          <table:table-cell table:style-name="ce1" office:value-type="string" calcext:value-type="string">
            <text:p>Column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9-2025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so day 1 my GDD got corrected but it was good enough to contine, I was doing the unity 2d model in school so that i can learn more about how to make my game and it is really good for it. already got on playercontroller and i know how to make tilemaps. as wel and colliders and also UI via UItoolkit</text:p>
          </table:table-cell>
          <table:table-cell table:style-name="ce8" office:value-type="string" calcext:value-type="string">
            <text:p>8-ish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16-9-2025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was sick, not a great day. this on opdracht but that is it. will continue tomorrow</text:p>
          </table:table-cell>
          <table:table-cell table:style-name="ce8" office:value-type="string" calcext:value-type="string">
            <text:p>not good, had to take a nap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17-9-2025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Finally finished the unity 2d module so i can get started tommorow on my project, now that i have the tools and knowlogde to do so</text:p>
          </table:table-cell>
          <table:table-cell table:style-name="ce8" office:value-type="string" calcext:value-type="string">
            <text:p>no alarm, no it was nice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18-9-2025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I was sick and did get to do anything, also had a family event to go to.</text:p>
          </table:table-cell>
          <table:table-cell table:style-name="ce8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19-9-2025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search online for tileset to use in my game that was a good fit and also 32-bit, i also had work this day.</text:p>
          </table:table-cell>
          <table:table-cell table:style-name="ce8" office:value-type="string" calcext:value-type="string">
            <text:p>not good sleep was tired the whole day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0-9-2025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I make the player sprite and added and idle animation</text:p>
          </table:table-cell>
          <table:table-cell table:style-name="ce8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1-9-2025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I made the player run animation</text:p>
          </table:table-cell>
          <table:table-cell table:style-name="ce8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2-9-2025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I was getting started on finally make the title screen and it got finished and it works</text:p>
          </table:table-cell>
          <table:table-cell table:style-name="ce8" office:value-type="string" calcext:value-type="string">
            <text:p>7 hou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3-9-2025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The pause menu is make but now i am also rescheduling the milestone on when they need to get done, i posted the my third tiktok today so luckily i also make this</text:p>
          </table:table-cell>
          <table:table-cell table:style-name="ce8" office:value-type="string" calcext:value-type="string">
            <text:p>7 hou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4-9-2025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9" office:value-type="string" calcext:value-type="string">
            <text:p>7 hou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Ziek</text:p>
          </table:table-cell>
          <table:table-cell table:style-name="ce5" office:value-type="string" calcext:value-type="string">
            <text:p>Ziek</text:p>
          </table:table-cell>
          <table:table-cell table:style-name="ce4" office:value-type="string" calcext:value-type="string">
            <text:p>Ziek</text:p>
          </table:table-cell>
          <table:table-cell table:style-name="ce9" office:value-type="string" calcext:value-type="string">
            <text:p>Ziek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7-10-2025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string" calcext:value-type="string">
            <text:p>Making an ghost enemy, when the ghost see you it comes for you</text:p>
          </table:table-cell>
          <table:table-cell table:style-name="ce9" office:value-type="string" calcext:value-type="string">
            <text:p>8 hou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8-10-2025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string" calcext:value-type="string">
            <text:p>Making the World better and it having an end</text:p>
          </table:table-cell>
          <table:table-cell table:style-name="ce9" office:value-type="string" calcext:value-type="string">
            <text:p>8 hou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9-10-2025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Making an dog enemy that goes on patrols and the sprite also get flips around now as well</text:p>
          </table:table-cell>
          <table:table-cell table:style-name="ce9" office:value-type="string" calcext:value-type="string">
            <text:p>6 hours, bad sleep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30-10-2025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Making the teacher sprite and make it inacterable, so that you can do some kind of puzzle</text:p>
          </table:table-cell>
          <table:table-cell table:style-name="ce9" office:value-type="string" calcext:value-type="string">
            <text:p>7 hou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31-10-2025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added an overlay, so that you can see how long you have been playing and how many hearts you have collected</text:p>
          </table:table-cell>
          <table:table-cell table:style-name="ce9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date" office:date-value="2025-01-11" calcext:value-type="date">
            <text:p>1-11-2025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Changed the the teacher to just have a math question and added a school sprite</text:p>
          </table:table-cell>
          <table:table-cell table:style-name="ce9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date" office:date-value="2025-02-11" calcext:value-type="date">
            <text:p>2-11-20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Overdachts doc maken,</text:p>
          </table:table-cell>
          <table:table-cell table:style-name="ce9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date" office:date-value="2025-03-11" calcext:value-type="date">
            <text:p>3-11-2025</text:p>
          </table:table-cell>
          <table:table-cell table:style-name="ce4"/>
          <table:table-cell table:style-name="ce4" office:value-type="string" calcext:value-type="string">
            <text:p>Prenestatie dag</text:p>
          </table:table-cell>
          <table:table-cell table:style-name="ce9" office:value-type="string" calcext:value-type="string">
            <text:p>0 hou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9"/>
          <table:table-cell table:style-name="ce4" table:number-columns-repeated="2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Sheet1.A1:Sheet1.F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Dev/6.0.5.2$Linux_X86_64 LibreOffice_project/</meta:generator>
  </office:meta>
</office:document-meta>
</file>